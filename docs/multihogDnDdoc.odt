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3">
  <office:automatic-styles>
    <style:style style:name="P" style:family="paragraph">
      <style:paragraph-properties fo:margin-bottom="0.15in"/>
      <style:text-properties fo:font-size="11pt"/>
    </style:style>
    <style:style style:name="H1" style:family="paragraph">
      <style:paragraph-properties fo:margin-top="0.2in" fo:margin-bottom="0.15in"/>
      <style:text-properties fo:font-size="22pt" fo:font-weight="bold"/>
    </style:style>
    <style:style style:name="H2" style:family="paragraph">
      <style:paragraph-properties fo:margin-top="0.25in" fo:margin-bottom="0.12in"/>
      <style:text-properties fo:font-size="16pt" fo:font-weight="bold"/>
    </style:style>
    <style:style style:name="H3" style:family="paragraph">
      <style:paragraph-properties fo:margin-top="0.2in" fo:margin-bottom="0.1in"/>
      <style:text-properties fo:font-size="13pt" fo:font-weight="bold"/>
    </style:style>
    <style:style style:name="H4" style:family="paragraph">
      <style:paragraph-properties fo:margin-top="0.15in" fo:margin-bottom="0.08in"/>
      <style:text-properties fo:font-size="12pt" fo:font-weight="bold"/>
    </style:style>
    <style:style style:name="Bullet" style:family="paragraph">
      <style:paragraph-properties fo:margin-left="0.25in" fo:margin-bottom="0.08in"/>
    </style:style>
    <style:style style:name="Quote" style:family="paragraph">
      <style:paragraph-properties fo:margin-left="0.3in" fo:margin-bottom="0.1in"/>
      <style:text-properties fo:font-style="italic"/>
    </style:style>
    <style:style style:name="Pre" style:family="paragraph">
      <style:paragraph-properties fo:margin-bottom="0.12in" fo:background-color="#f4f4f4" fo:padding="0.08in"/>
      <style:text-properties fo:font-family="Consolas" fo:font-size="9pt"/>
    </style:style>
    <style:style style:name="Strong" style:family="text">
      <style:text-properties fo:font-weight="bold"/>
    </style:style>
    <style:style style:name="Emph" style:family="text">
      <style:text-properties fo:font-style="italic"/>
    </style:style>
    <style:style style:name="Code" style:family="text">
      <style:text-properties fo:font-family="Consolas" fo:font-size="9pt"/>
    </style:style>
  </office:automatic-styles>
  <office:body>
    <office:text>
      <text:h text:style-name="H1" text:outline-level="1">Multihog D&amp;D Framework</text:h>
      <text:p text:style-name="P"/>
      <text:p text:style-name="P">Welcome to Multihog D&amp;D Framework, a simulation-focused AI RPG platform that is highly modular and customizable. Your imagination is the ceiling.</text:p>
      <text:p text:style-name="P"/>
      <text:p text:style-name="P">This document is written so a tutorial bot (or a new player) can explain <text:span text:style-name="Strong">what the system is</text:span>, <text:span text:style-name="Strong">how a turn actually runs</text:span>, and <text:span text:style-name="Strong">how to use each major feature</text:span> without inventing behavior.</text:p>
      <text:p text:style-name="P"/>
      <text:p text:style-name="P">The D&amp;D setup is the default plug-and-play cartridge. You can scrap the stock system prompt and modules and track whatever you want — fantasy, slice-of-life, modern, sci-fi, or pure homebrew.</text:p>
      <text:p text:style-name="P"/>
      <text:p text:style-name="P"/>
      <text:p text:style-name="P"/>
      <text:h text:style-name="H2" text:outline-level="2">The Core Components</text:h>
      <text:p text:style-name="P"/>
      <text:p text:style-name="Bullet">1. <text:span text:style-name="Strong">The System Prompt</text:span> — the brain of the Game Master (GM) / Narrator; game logic lives here.</text:p>
      <text:p text:style-name="Bullet">2. <text:span text:style-name="Strong">The State Tracker</text:span> — the mechanical “accountant”; keeps HP, inventory, time, combat, and more aligned with the story.</text:p>
      <text:p text:style-name="Bullet">3. <text:span text:style-name="Strong">Hybrid RNG</text:span> — deterministic dice queues and/or commitment-based tool-call dice so the world has real physics instead of plot armor.</text:p>
      <text:p text:style-name="Bullet">4. <text:span text:style-name="Strong">The Lorebook Agent</text:span> — the librarian; chronicles NPCs, locations, factions, events, and relationships for long-term memory.</text:p>
      <text:p text:style-name="Bullet">5. <text:span text:style-name="Strong">World Progression</text:span> — macroscopic off-screen world simulation on an in-world time schedule.</text:p>
      <text:p text:style-name="P"/>
      <text:p text:style-name="P">Together they address the four classic LLM-tabletop failures: forgotten inventory/spells, lost long-term context, inevitable player victory, and a static world outside the player’s bubble.</text:p>
      <text:p text:style-name="P"/>
      <text:p text:style-name="P"/>
      <text:p text:style-name="P"/>
      <text:h text:style-name="H2" text:outline-level="2">Installation</text:h>
      <text:p text:style-name="P"/>
      <text:p text:style-name="P">Packaged releases may lag. Prefer installing from the repo:</text:p>
      <text:p text:style-name="P"/>
      <text:p text:style-name="Bullet">1. Open SillyTavern’s extension menu.</text:p>
      <text:p text:style-name="Bullet">2. Choose <text:span text:style-name="Strong">Install extension</text:span>.</text:p>
      <text:p text:style-name="Bullet">3. Paste this repository’s URL.</text:p>
      <text:p text:style-name="P"/>
      <text:p text:style-name="P">Suggested companion: <text:span text:style-name="Strong">[Summaryception](https://github.com/Lodactio/Extension-Summaryception)</text:span> — context compression that pairs well with Lorebook Agent (rough arc from the summarizer; microscopic records from the agent).</text:p>
      <text:p text:style-name="P"/>
      <text:p text:style-name="P"/>
      <text:p text:style-name="P"/>
      <text:h text:style-name="H2" text:outline-level="2">Recommended Models</text:h>
      <text:p text:style-name="P"/>
      <text:p text:style-name="P">These are recommendations, not rules.</text:p>
      <text:p text:style-name="P"/>
      <text:p text:style-name="P">Role — Suggestion — Notes</text:p>
      <text:p text:style-name="P">Narrator / GM — MiMo 2.5 Pro or DeepSeek 4 Pro (e.g. via OpenRouter) — Needs <text:span text:style-name="Strong">tool calling</text:span> if you use Hybrid RNG (tool-call mode).</text:p>
      <text:p text:style-name="P">State Tracker + Lorebook Agent — Gemini 3.1 Flash-Lite (or Flash / 3.5 Flash) — Cheap and reliable for extraction / lore passes.</text:p>
      <text:p text:style-name="P">Combat narrator (optional) — Gemini 3.5 Flash with thinking Medium — Use <text:span text:style-name="Strong">Combat API Override</text:span> so combat uses a faster model while <text:span text:style-name="Code">[COMBAT]</text:span> is active.</text:p>
      <text:p text:style-name="P"/>
      <text:p text:style-name="P"/>
      <text:p text:style-name="P"/>
      <text:h text:style-name="H2" text:outline-level="2">First-Time Setup</text:h>
      <text:p text:style-name="P"/>
      <text:h text:style-name="H3" text:outline-level="3">Narrator character</text:h>
      <text:p text:style-name="P"/>
      <text:p text:style-name="P">Create (or load) a SillyTavern character card that acts as the narrator — e.g. “Simulation Engine” or “Game Master.” The framework injects mechanical truth into prompts; the card supplies voice and framing.</text:p>
      <text:p text:style-name="P"/>
      <text:h text:style-name="H3" text:outline-level="3">Enable the framework</text:h>
      <text:p text:style-name="P"/>
      <text:p text:style-name="P">Turn the extension on in settings. With <text:span text:style-name="Strong">Custom Sysprompt Mode</text:span> off, the framework writes its assembled GM prompt into SillyTavern’s <text:span text:style-name="Strong">Quick Prompt → Main</text:span>. It can back up your previous Main prompt and restore it when the tracker is disabled (if Main prompt backup is enabled).</text:p>
      <text:p text:style-name="P"/>
      <text:h text:style-name="H3" text:outline-level="3">Instant Action (fastest path)</text:h>
      <text:p text:style-name="P"/>
      <text:p text:style-name="P">On an empty tracker, use Instant Action / Quick Start by genre (<text:span text:style-name="Strong">Fantasy</text:span>, <text:span text:style-name="Strong">Modern</text:span>, <text:span text:style-name="Strong">Sci-Fi</text:span>, <text:span text:style-name="Strong">Horror</text:span>). The pipeline is sequential:</text:p>
      <text:p text:style-name="P"/>
      <text:p text:style-name="Bullet">1. Applies your current Narrator Configuration (settings + sysprompt).</text:p>
      <text:p text:style-name="Bullet">2. Picks a random archetype for that genre and generates a character sheet into the State Tracker.</text:p>
      <text:p text:style-name="Bullet">3. Generates a persona bio, adds a <text:span text:style-name="Strong">Player Card</text:span> for Lorebook Agent, and activates the SillyTavern persona.</text:p>
      <text:p text:style-name="Bullet">4. Sends the chat message <text:span text:style-name="Code">Begin the adventure</text:span>.</text:p>
      <text:p text:style-name="P"/>
      <text:p text:style-name="P">You can also use <text:span text:style-name="Strong">Character Roll</text:span> with explicit name/class/level/gear, or paste an existing sheet into <text:span text:style-name="Strong">Raw View</text:span>. If formatting doesn’t match what the UI expects, use the tracker’s <text:span text:style-name="Strong">💬</text:span> button and ask the model to fix it.</text:p>
      <text:p text:style-name="P"/>
      <text:h text:style-name="H3" text:outline-level="3">Chat-Linked Mode</text:h>
      <text:p text:style-name="P"/>
      <text:p text:style-name="P">On by default. Each chat keeps its own memo, modules, quests, portraits, Lorebook Agent watermarks, World Progression timer, and related campaign data under that chat ID. Switching chats saves the old partition and loads the new one. Campaign lorebook prefix is derived from the chat filename (sanitized) unless overridden.</text:p>
      <text:p text:style-name="P"/>
      <text:p text:style-name="P"><text:span text:style-name="Strong">Scenario Profiles</text:span> are a separate feature: named snapshots of memo + modules + campaign-related fields you can save/load manually. They are not a full dump of connection settings or UI preferences.</text:p>
      <text:p text:style-name="P"/>
      <text:p text:style-name="P"/>
      <text:p text:style-name="P"/>
      <text:h text:style-name="H2" text:outline-level="2">How a Turn Works</text:h>
      <text:p text:style-name="P"/>
      <text:p text:style-name="P">Understanding this loop is more important than memorizing every setting.</text:p>
      <text:p text:style-name="P"/>
      <text:h text:style-name="H3" text:outline-level="3">Before the narrator replies (interceptor)</text:h>
      <text:p text:style-name="P"/>
      <text:p text:style-name="P">When you send a message, the framework finds the last user message and can prepend:</text:p>
      <text:p text:style-name="P"/>
      <text:p text:style-name="Bullet">• <text:span text:style-name="Code">[PLAYER_CHARACTER]</text:span> (if linked)</text:p>
      <text:p text:style-name="Bullet">• <text:span text:style-name="Code">[NPC_RELATIONS]</text:span></text:p>
      <text:p text:style-name="Bullet">• An <text:span text:style-name="Strong">RNG Queue</text:span> block (when Pre-Seeded RNG applies — see Hybrid RNG)</text:p>
      <text:p text:style-name="Bullet">• <text:span text:style-name="Code">### STATE MEMO (DO NOT REPEAT)</text:span> — the <text:span text:style-name="Strong">previous</text:span> turn’s tracked state</text:p>
      <text:p text:style-name="Bullet">• Quest / deadline context</text:p>
      <text:p text:style-name="Bullet">• Active lore / World Report injections (position and depth configurable)</text:p>
      <text:p text:style-name="Bullet">• Optional end-of-output footer reminder</text:p>
      <text:p text:style-name="P"/>
      <text:p text:style-name="P">So the GM always sees the last known mechanical truth <text:span text:style-name="Strong">before</text:span> it writes the next scene.</text:p>
      <text:p text:style-name="P"/>
      <text:h text:style-name="H3" text:outline-level="3">After the narrator replies</text:h>
      <text:p text:style-name="P"/>
      <text:p text:style-name="P">On generation end (skipped for quiet/impersonate and while a pass is already running), roughly:</text:p>
      <text:p text:style-name="P"/>
      <text:p text:style-name="Bullet">1. Keyword scan of the assistant output (when Lorebook Agent keyword systems are active).</text:p>
      <text:p text:style-name="Bullet">2. <text:span text:style-name="Strong">State Tracker</text:span> pass (throttled by “run every N”; default every turn) — parses the new narrative and updates the memo.</text:p>
      <text:p text:style-name="Bullet">3. <text:span text:style-name="Strong">Combat API Override</text:span> sync (switch/restore narrator profile if combat started/ended).</text:p>
      <text:p text:style-name="Bullet">4. Dynamic RNG prompt sync (Hybrid mode combat boundary).</text:p>
      <text:p text:style-name="Bullet">5. <text:span text:style-name="Strong">World Progression</text:span> TIME check (deterministic; see that section).</text:p>
      <text:p text:style-name="Bullet">6. <text:span text:style-name="Strong">Lorebook Agent</text:span> tick / pass when its “run every N” threshold is met.</text:p>
      <text:p text:style-name="P"/>
      <text:p text:style-name="P">Important: the State Tracker runs <text:span text:style-name="Strong">after</text:span> the reply. The memo injected on the <text:span text:style-name="Emph">next</text:span> turn is what was updated from the <text:span text:style-name="Emph">previous</text:span> reply.</text:p>
      <text:p text:style-name="P"/>
      <text:p text:style-name="P"><text:span text:style-name="Code">/sendas</text:span> does <text:span text:style-name="Strong">not</text:span> auto-trigger Lorebook Agent; use <text:span text:style-name="Code">/lorebookagent</text:span> manually if needed.</text:p>
      <text:p text:style-name="P"/>
      <text:p text:style-name="P"/>
      <text:p text:style-name="P"/>
      <text:h text:style-name="H2" text:outline-level="2">The System Prompt</text:h>
      <text:p text:style-name="P"/>
      <text:p text:style-name="P">This is the brain of the GM/Narrator. If it is removed (and nothing replaces it), the narrator no longer knows how to run the game.</text:p>
      <text:p text:style-name="P"/>
      <text:h text:style-name="H3" text:outline-level="3">Where it lives</text:h>
      <text:p text:style-name="P"/>
      <text:p text:style-name="Bullet">• Source templates: <text:span text:style-name="Code">sysprompt.txt</text:span> (tool-call / Hybrid RNG) or <text:span text:style-name="Code">sysprompt_legacy.txt</text:span> (queue-oriented legacy RNG).</text:p>
      <text:p text:style-name="Bullet">• Assembled into SillyTavern <text:span text:style-name="Strong">Quick Prompt → Main</text:span> when the tracker is on and Custom Sysprompt Mode is off.</text:p>
      <text:p text:style-name="Bullet">• <text:span text:style-name="Strong">System Prompt Control Room</text:span> lets you reorder, enable/disable, unlock/edit built-in sections, and add custom library sections (manual or AI wizard).</text:p>
      <text:p text:style-name="P"/>
      <text:h text:style-name="H3" text:outline-level="3">Custom Sysprompt Mode</text:h>
      <text:p text:style-name="P"/>
      <text:p text:style-name="P">When enabled, the framework <text:span text:style-name="Strong">does not</text:span> overwrite Quick Prompt Main. Section toggles can still be saved, but auto-apply and combat-driven dynamic RNG prompt rewrites for the main prompt are disabled. Use this when you fully own the narrator prompt yourself.</text:p>
      <text:p text:style-name="P"/>
      <text:h text:style-name="H3" text:outline-level="3">Major built-in sections (examples)</text:h>
      <text:p text:style-name="P"/>
      <text:p text:style-name="P">The prompt is modular XML-style sections, including among others:</text:p>
      <text:p text:style-name="P"/>
      <text:p text:style-name="P">Area — Example sections</text:p>
      <text:p text:style-name="P">Identity &amp; dice — <text:span text:style-name="Code">&lt;role&gt;</text:span>, <text:span text:style-name="Code">&lt;rng_system&gt;</text:span>, <text:span text:style-name="Code">&lt;rng_queue_instructions&gt;</text:span></text:p>
      <text:p text:style-name="P">Combat — <text:span text:style-name="Code">&lt;combat&gt;</text:span>, <text:span text:style-name="Code">&lt;combat_start&gt;</text:span>, <text:span text:style-name="Code">&lt;combat_flow&gt;</text:span>, <text:span text:style-name="Code">&lt;damage_logic&gt;</text:span>, <text:span text:style-name="Code">&lt;positioning_and_movement&gt;</text:span>, <text:span text:style-name="Code">&lt;npc_stat_scaling&gt;</text:span>, <text:span text:style-name="Code">&lt;critical_hits_and_dying&gt;</text:span></text:p>
      <text:p text:style-name="P">Progression — <text:span text:style-name="Code">&lt;xp_system&gt;</text:span>, <text:span text:style-name="Code">&lt;level_up_protocol&gt;</text:span>, <text:span text:style-name="Code">&lt;quests&gt;</text:span>, <text:span text:style-name="Code">&lt;loot&gt;</text:span></text:p>
      <text:p text:style-name="P">Simulation — <text:span text:style-name="Code">&lt;narrative&gt;</text:span>, <text:span text:style-name="Code">&lt;world_progression&gt;</text:span>, <text:span text:style-name="Code">&lt;resting&gt;</text:span>, <text:span text:style-name="Code">&lt;leaving_vs_benching&gt;</text:span>, <text:span text:style-name="Code">&lt;bench_ETA_system&gt;</text:span>, <text:span text:style-name="Code">&lt;relationship_tracking&gt;</text:span></text:p>
      <text:p text:style-name="P">Output contract — <text:span text:style-name="Code">&lt;state_memo&gt;</text:span>, <text:span text:style-name="Code">&lt;end_of_output_footer&gt;</text:span>, <text:span text:style-name="Code">&lt;CYOA_mode&gt;</text:span>, various <text:span text:style-name="Code">&lt;constraints&gt;</text:span></text:p>
      <text:p text:style-name="P"/>
      <text:h text:style-name="H3" text:outline-level="3">Combat rules the GM is taught (summary)</text:h>
      <text:p text:style-name="P"/>
      <text:p text:style-name="P"><text:span text:style-name="Code">&lt;combat_start&gt;</text:span> — Declare previously-unknown NPC stats (AC, saves, HP, combat line, resistances, etc.), then roll initiative. Caster enemies list spells by level + slots at introduction (e.g. <text:span text:style-name="Code">Cantrips: Fire Bolt; Level 1 (2/2): Magic Missile, Shield</text:span>) — never a flat comma list.</text:p>
      <text:p text:style-name="P"/>
      <text:p text:style-name="P"><text:span text:style-name="Code">&lt;combat_flow&gt;</text:span> — Simulate every NPC each round. Use pre-calculated totals from STATE MEMO (<text:span text:style-name="Code">[CHARACTER]</text:span> / <text:span text:style-name="Code">[PARTY]</text:span> / <text:span text:style-name="Code">[COMBAT]</text:span>) — never re-derive bonuses mid-fight. Martials use Combat line Melee/Ranged values; casters use listed Spell Atk / Spell DC. Slash-separated values (<text:span text:style-name="Code">+X/+Y</text:span>) mean one roll per value. State remaining HP after every damage/heal. Buffs/debuffs expire on schedule; state initial duration (e.g. Mage Armor 8h, Heroism 10 turns).</text:p>
      <text:p text:style-name="P"/>
      <text:p text:style-name="P"/>
      <text:p text:style-name="P"/>
      <text:h text:style-name="H2" text:outline-level="2">Hybrid RNG</text:h>
      <text:p text:style-name="P"/>
      <text:p text:style-name="P">Hybrid RNG is the physics layer. Without it, models tend toward sycophantic success.</text:p>
      <text:p text:style-name="P"/>
      <text:h text:style-name="H3" text:outline-level="3">Modes (Narrator Configuration → RNG)</text:h>
      <text:p text:style-name="P"/>
      <text:p text:style-name="P">Mode — Behavior</text:p>
      <text:p text:style-name="P"><text:span text:style-name="Strong">Pre-Seeded + Tool Calls</text:span> (Hybrid) — Out of combat: <text:span text:style-name="Code">RollTheDice</text:span> / <text:span text:style-name="Code">RollTheDiceD100</text:span> tools only. <text:span text:style-name="Strong">In combat:</text:span> RNG Queue only; dice tools are unregistered for that context.</text:p>
      <text:p text:style-name="P"><text:span text:style-name="Strong">Pre-Seeded Only</text:span> — Queue injected every eligible turn; no dice tools. Default in code settings. Recommended with <text:span text:style-name="Strong">CYOA</text:span>.</text:p>
      <text:p text:style-name="P"><text:span text:style-name="Strong">No RNG</text:span> — Neither queue nor tools.</text:p>
      <text:p text:style-name="P"/>
      <text:h text:style-name="H3" text:outline-level="3">RNG Queue</text:h>
      <text:p text:style-name="P"/>
      <text:p text:style-name="Bullet">• Built with cryptographically random values.</text:p>
      <text:p text:style-name="Bullet">• Typical d20 queue: multiple pre-rolled lines for common dice.</text:p>
      <text:p text:style-name="Bullet">• Optional d100 queue (percentage mode).</text:p>
      <text:p text:style-name="Bullet">• Injected into the user message when Pre-Seeded RNG applies (always in Pre-Seeded Only; in Hybrid, primarily when combat is active).</text:p>
      <text:p text:style-name="P"/>
      <text:h text:style-name="H3" text:outline-level="3">Tool-call dice (commitment logic)</text:h>
      <text:p text:style-name="P"/>
      <text:p text:style-name="P">Non-legacy tool schema requires the narrator to declare <text:span text:style-name="Strong">who</text:span>, <text:span text:style-name="Strong">formula</text:span>, and <text:span text:style-name="Strong">dc</text:span> <text:span text:style-name="Emph">before</text:span> seeing the result:</text:p>
      <text:p text:style-name="P"/>
      <text:p text:style-name="Bullet">• <text:span text:style-name="Strong">d20:</text:span> success if <text:span text:style-name="Code">total &gt;= dc</text:span>.</text:p>
      <text:p text:style-name="Bullet">• <text:span text:style-name="Strong">d100:</text:span> roll-under; success if <text:span text:style-name="Code">total &lt;= dc</text:span> (dc is a percentage).</text:p>
      <text:p text:style-name="P"/>
      <text:p text:style-name="P">Legacy dice logic omits DC (vanilla-style tool). The narrator model must support <text:span text:style-name="Strong">tool calling</text:span> for Hybrid / tool modes.</text:p>
      <text:p text:style-name="P"/>
      <text:h text:style-name="H3" text:outline-level="3">Combat detection</text:h>
      <text:p text:style-name="P"/>
      <text:p text:style-name="P">Combat is considered active when a non-empty <text:span text:style-name="Code">[COMBAT]…[/COMBAT]</text:span> block exists and is not <text:span text:style-name="Code">END_COMBAT</text:span>. That gate drives Hybrid’s tool↔queue switch and Combat API Override.</text:p>
      <text:p text:style-name="P"/>
      <text:h text:style-name="H3" text:outline-level="3">d100 mode</text:h>
      <text:p text:style-name="P"/>
      <text:p text:style-name="P">Enabling d100 tools/queues flips global percentage-style behavior (tool names, queue tags, and sysprompt substitutions). Stock prompt adaptation is basic — customize <text:span text:style-name="Code">&lt;rng_system&gt;</text:span> in the Control Room if you lean on d100 heavily.</text:p>
      <text:p text:style-name="P"/>
      <text:p text:style-name="P"/>
      <text:p text:style-name="P"/>
      <text:h text:style-name="H2" text:outline-level="2">The State Tracker</text:h>
      <text:p text:style-name="P"/>
      <text:p text:style-name="P">The State Tracker (ST) is the accountant of the system. It does <text:span text:style-name="Strong">not</text:span> invent narrative or own the ruleset; it keeps the GM honest about mechanical state — especially when history is summarized out of the context window.</text:p>
      <text:p text:style-name="P"/>
      <text:p text:style-name="P">ST parses the narrative in natural language. Exact string matches are not required; if the information is present and comprehensible, the tracker can record it. Each turn the GM receives a <text:span text:style-name="Strong">STATE MEMO</text:span> injection on the user message so it always sees the current mechanical picture.</text:p>
      <text:p text:style-name="P"/>
      <text:h text:style-name="H3" text:outline-level="3">Modules</text:h>
      <text:p text:style-name="P"/>
      <text:p text:style-name="P">ST is built from <text:span text:style-name="Strong">modules</text:span>. Each module:</text:p>
      <text:p text:style-name="P"/>
      <text:p text:style-name="Bullet">1. Owns a UI section in the tracker window.</text:p>
      <text:p text:style-name="Bullet">2. Owns a prompt that tells the tracker what to record.</text:p>
      <text:p text:style-name="Bullet">3. Uses a corresponding <text:span text:style-name="Code">[TAG]</text:span> in the memo (e.g. <text:span text:style-name="Code">[COMBAT]</text:span>, <text:span text:style-name="Code">[INVENTORY]</text:span>).</text:p>
      <text:p text:style-name="P"/>
      <text:p text:style-name="P">Adding a template/example inside a module prompt is optional but strongly recommended so output matches the rendering backend.</text:p>
      <text:p text:style-name="P"/>
      <text:h text:style-name="H3" text:outline-level="3">Stock modules</text:h>
      <text:p text:style-name="P"/>
      <text:h text:style-name="H4" text:outline-level="4"><text:span text:style-name="Code">[CHARACTER]</text:span></text:h>
      <text:p text:style-name="P"/>
      <text:p text:style-name="P">Player core sheet: HP, Combat line (BAB, Melee/Ranged attack totals with attacks-per-round), Base/Total AC, Gear summary, Proficiencies, Attr, Saves, Skills, Traits, Hit Dice, Status.</text:p>
      <text:p text:style-name="P"/>
      <text:p text:style-name="P">Total AC is Base AC plus bonuses from <text:span text:style-name="Code">[INVENTORY]</text:span> items tagged <text:span text:style-name="Code">[E]</text:span>. Melee/Ranged totals on the Combat line are authoritative during fights — the GM should not re-invent them.</text:p>
      <text:p text:style-name="P"/>
      <text:h text:style-name="H4" text:outline-level="4"><text:span text:style-name="Code">[PARTY]</text:span></text:h>
      <text:p text:style-name="P"/>
      <text:p text:style-name="P">Active companions (max 5 + <text:span text:style-name="Code">{{user}}</text:span>). Same general sheet shape as the player, plus Abilities/Spells lines for casters.</text:p>
      <text:p text:style-name="P"/>
      <text:p text:style-name="Bullet">• Add on narration like <text:span text:style-name="Code">(X joins the party.)</text:span></text:p>
      <text:p text:style-name="Bullet">• Permanent remove <text:span text:style-name="Strong">only</text:span> on exact annotation <text:span text:style-name="Code"><text:span text:style-name="Emph">(Left the party: X — reason)</text:span></text:span></text:p>
      <text:p text:style-name="Bullet">• If the roster changes, output the <text:span text:style-name="Strong">entire</text:span> <text:span text:style-name="Code">[PARTY]</text:span> block; if unchanged, omit it.</text:p>
      <text:p text:style-name="P"/>
      <text:h text:style-name="H4" text:outline-level="4"><text:span text:style-name="Code">[BENCHED PARTY]</text:span></text:h>
      <text:p text:style-name="P"/>
      <text:p text:style-name="P">Temporary separation while reunion remains plausible. The tracker moves full stat sheets in code — the module outputs commands only:</text:p>
      <text:p text:style-name="P"/>
      <text:p text:style-name="Pre">[BENCHED PARTY]<text:line-break/>[BENCH] Gareth — stayed at the lodging to rest and study<text:line-break/>[/BENCHED PARTY]</text:p>
      <text:p text:style-name="P"/>
      <text:p text:style-name="P"><text:span text:style-name="Code">[UNBENCH] Name</text:span> reunites. Optional <text:span text:style-name="Code">ETA:</text:span> timestamps when the story gives a real return time. Brief off-screen absence is <text:span text:style-name="Strong">not</text:span> a bench. Benched members can appear in World Progression reports.</text:p>
      <text:p text:style-name="P"/>
      <text:h text:style-name="H4" text:outline-level="4"><text:span text:style-name="Code">[COMBAT]</text:span></text:h>
      <text:p text:style-name="P"/>
      <text:p text:style-name="P">Active enemies, combat round counter, per-combatant HP, Att/def, saves, abilities, spells (casters), other traits, status. Martial vs caster layouts must not be mixed on one enemy. Tier bands (Minion → Legendary) guide invented stats. End combat with:</text:p>
      <text:p text:style-name="P"/>
      <text:p text:style-name="Pre">[COMBAT]END_COMBAT[/COMBAT]</text:p>
      <text:p text:style-name="P"/>
      <text:p text:style-name="P">Party members never belong inside <text:span text:style-name="Code">[COMBAT]</text:span>.</text:p>
      <text:p text:style-name="P"/>
      <text:h text:style-name="H4" text:outline-level="4"><text:span text:style-name="Code">[INVENTORY]</text:span></text:h>
      <text:p text:style-name="P"/>
      <text:p text:style-name="P">Two headers: <text:span text:style-name="Strong">Gear:</text:span> and <text:span text:style-name="Strong">Other Items:</text:span></text:p>
      <text:p text:style-name="P"/>
      <text:p text:style-name="Bullet">• Every item: thematic emoji + rarity <text:span text:style-name="Code">[Common]</text:span>…<text:span text:style-name="Code">[Artifact]</text:span> + worth <text:span text:style-name="Code">(~X currency)</text:span></text:p>
      <text:p text:style-name="Bullet">• Magical weapons/armor: suffix naming (<text:span text:style-name="Code">Flame Dagger +1</text:span>), never <text:span text:style-name="Code">+1 Flame Dagger</text:span></text:p>
      <text:p text:style-name="Bullet">• Equipped: <text:span text:style-name="Code">[E]</text:span> immediately after rarity</text:p>
      <text:p text:style-name="Bullet">• Bare currency under Other Items (💰 coins / 💵 paper)</text:p>
      <text:p text:style-name="P"/>
      <text:p text:style-name="P">Example:</text:p>
      <text:p text:style-name="P"/>
      <text:p text:style-name="Pre">[INVENTORY]<text:line-break/>Gear:<text:line-break/>- 🗡️ [Rare] [E] Flame Dagger +1 (1d6+2 Fire, +1 to hit) (~350 GP)<text:line-break/>- 🛡️ [Common] Iron Buckler (AC +2) (~15 GP)<text:line-break/>Other Items:<text:line-break/>- 🧪 [Uncommon] Healing Potion (Restores 2d4+2 HP) (~50 GP)<text:line-break/>- 🪢 [Common] Rope, 50 ft (~1 GP)<text:line-break/>- 💰 1,200 GP<text:line-break/>[/INVENTORY]</text:p>
      <text:p text:style-name="P"/>
      <text:p text:style-name="P">Worth values can auto-render as coin badges in the UI.</text:p>
      <text:p text:style-name="P"/>
      <text:h text:style-name="H4" text:outline-level="4"><text:span text:style-name="Code">[ABILITIES]</text:span> / <text:span text:style-name="Code">[SPELLS]</text:span></text:h>
      <text:p text:style-name="P"/>
      <text:p text:style-name="P">Abilities = non-spell class features only. Spells = cantrips + leveled slots <text:span text:style-name="Code">Level N (avail/max): …</text:span>. Never mix the two.</text:p>
      <text:p text:style-name="P"/>
      <text:h text:style-name="H4" text:outline-level="4"><text:span text:style-name="Code">[TIME]</text:span></text:h>
      <text:p text:style-name="P"/>
      <text:p text:style-name="P">Clock + last long rest. Format variants exist (12h/24h, Day N vs DD/MM/YYYY). Used for:</text:p>
      <text:p text:style-name="P"/>
      <text:p text:style-name="Bullet">• Out-of-combat buff decay (delta vs prior memo)</text:p>
      <text:p text:style-name="Bullet">• Distinguishing short rest (~1h) vs long rest</text:p>
      <text:p text:style-name="Bullet">• <text:span text:style-name="Strong">World Progression</text:span> scheduling (in-world elapsed time)</text:p>
      <text:p text:style-name="P"/>
      <text:h text:style-name="H4" text:outline-level="4"><text:span text:style-name="Code">[XP]</text:span></text:h>
      <text:p text:style-name="P"/>
      <text:p text:style-name="P"><text:span text:style-name="Code">Level: X | XP: current/max</text:span> whenever XP or level-up is narrated.</text:p>
      <text:p text:style-name="P"/>
      <text:h text:style-name="H4" text:outline-level="4"><text:span text:style-name="Code">[QUESTS]</text:span></text:h>
      <text:p text:style-name="P"/>
      <text:p text:style-name="P">Only accepted tasks (not mere offers). Engine archives completed/failed; memo usually holds actives. Fields include <text:span text:style-name="Code">ID</text:span>, <text:span text:style-name="Code">STATUS</text:span>, <text:span text:style-name="Code">GIVER</text:span>, <text:span text:style-name="Code">ACCEPTED</text:span>, optional <text:span text:style-name="Code">DEADLINE</text:span>, <text:span text:style-name="Code">REWARD</text:span> lines, <text:span text:style-name="Code">FRUSTRATION_COEFF</text:span> (NPC-given only), <text:span text:style-name="Code">OBJ_ACTIVE</text:span> / <text:span text:style-name="Code">OBJ_COMPLETED</text:span> / <text:span text:style-name="Code">OBJ_FAILED</text:span>, optional <text:span text:style-name="Code">OBJ_TOTAL</text:span>. Emergent quests use <text:span text:style-name="Code">TYPE: emergent</text:span> and <text:span text:style-name="Code">GIVER: Self @ —</text:span>.</text:p>
      <text:p text:style-name="P"/>
      <text:p text:style-name="P">Narrator acceptance markers:</text:p>
      <text:p text:style-name="P"/>
      <text:p text:style-name="Bullet">• <text:span text:style-name="Code"><text:span text:style-name="Emph">(Quest Accepted: Name)</text:span></text:span></text:p>
      <text:p text:style-name="Bullet">• <text:span text:style-name="Code"><text:span text:style-name="Emph">(Emergent Quest Active: Name)</text:span></text:span></text:p>
      <text:p text:style-name="P"/>
      <text:p text:style-name="P">With Deadlines + Frustration enabled, overdue NPC quests decay giver mood via <text:span text:style-name="Code">FRUSTRATION_COEFF</text:span> (≈0.4 patient → 3.0 volatile) instead of hard auto-fail. Without Frustration, deadline expiry can auto-fail.</text:p>
      <text:p text:style-name="P"/>
      <text:h text:style-name="H3" text:outline-level="3">Tracker UI essentials</text:h>
      <text:p text:style-name="P"/>
      <text:p text:style-name="Bullet">• <text:span text:style-name="Strong">Rendered panel</text:span> — HP bars, spell pips, status pills, inventory badges, etc.</text:p>
      <text:p text:style-name="Bullet">• <text:span text:style-name="Strong">Raw View</text:span> — edit memo text directly.</text:p>
      <text:p text:style-name="Bullet">• <text:span text:style-name="Strong">💬 Direct Prompt</text:span> — talk to the tracker model with the prior memo (and optional recent chat context); bypasses the narrative pipeline; good for corrections and setup.</text:p>
      <text:p text:style-name="Bullet">• <text:span text:style-name="Strong">Full Audit</text:span> — chunked pass over large chat history to rebuild a complete memo.</text:p>
      <text:p text:style-name="Bullet">• <text:span text:style-name="Strong">Rendering Tags Library</text:span> — live previews of <text:span text:style-name="Code">((TAG))</text:span> markers used in module lines.</text:p>
      <text:p text:style-name="Bullet">• Mobile: open from the wand menu.</text:p>
      <text:p text:style-name="P"/>
      <text:h text:style-name="H3" text:outline-level="3">Connection settings</text:h>
      <text:p text:style-name="P"/>
      <text:p text:style-name="P">State Tracker can use Main API, a Connection <text:span text:style-name="Strong">Profile</text:span>, or dedicated Ollama/OpenAI endpoints. Its <text:span text:style-name="Strong">Core Prompt</text:span> is the tracker system prompt — separate from the narrator Quick Prompt.</text:p>
      <text:p text:style-name="P"/>
      <text:p text:style-name="P"><text:span text:style-name="Strong">Combat API Override</text:span> switches the <text:span text:style-name="Strong">main narrator</text:span> connection profile (not the State Extractor) while combat is active, then restores the baseline when combat ends.</text:p>
      <text:p text:style-name="P"/>
      <text:h text:style-name="H3" text:outline-level="3">Slash command</text:h>
      <text:p text:style-name="P"/>
      <text:p text:style-name="P"><text:span text:style-name="Code">/statetracker</text:span> (alias <text:span text:style-name="Code">/st</text:span>):</text:p>
      <text:p text:style-name="P"/>
      <text:p text:style-name="Bullet">• Default / <text:span text:style-name="Code">run</text:span> — normal update since last user turn</text:p>
      <text:p text:style-name="Bullet">• <text:span text:style-name="Code">full</text:span> / <text:span text:style-name="Code">audit</text:span> — full context audit</text:p>
      <text:p text:style-name="Bullet">• <text:span text:style-name="Code">lookback=N</text:span> — last N assistant blocks</text:p>
      <text:p text:style-name="Bullet">• <text:span text:style-name="Code">quiet=true</text:span> — suppress toast</text:p>
      <text:p text:style-name="P"/>
      <text:p text:style-name="P"/>
      <text:p text:style-name="P"/>
      <text:h text:style-name="H2" text:outline-level="2">Rendering Tags</text:h>
      <text:p text:style-name="P"/>
      <text:p text:style-name="P">Memo lines can include inline markers that the UI renders. Major families include:</text:p>
      <text:p text:style-name="P"/>
      <text:p text:style-name="P"><text:span text:style-name="Code">PILL</text:span> / <text:span text:style-name="Code">PILLS</text:span>, <text:span text:style-name="Code">BAR</text:span> (and HP aliases), <text:span text:style-name="Code">BARREL</text:span> (signed +/- bar), <text:span text:style-name="Code">NPC</text:span> (freeform NPC cards inside blocks), <text:span text:style-name="Code">XPBAR</text:span>, <text:span text:style-name="Code">TEXT</text:span>, <text:span text:style-name="Code">BADGE</text:span>, <text:span text:style-name="Code">HIGHLIGHT</text:span>, <text:span text:style-name="Code">OBJ</text:span>, <text:span text:style-name="Code">REWARD</text:span>, <text:span text:style-name="Code">DIFFICULTY</text:span>, <text:span text:style-name="Code">PROGRESS</text:span>, alert styles (<text:span text:style-name="Code">WARNING</text:span> / <text:span text:style-name="Code">SUCCESS</text:span> / …), currency (<text:span text:style-name="Code">GOLD</text:span> / <text:span text:style-name="Code">SILVER</text:span> / <text:span text:style-name="Code">DOLLAR</text:span> / …), <text:span text:style-name="Code">ROLL</text:span>, <text:span text:style-name="Code">CLOCK</text:span>, <text:span text:style-name="Code">STARS</text:span>, <text:span text:style-name="Code">WEIGHT</text:span> / <text:span text:style-name="Code">CAPACITY</text:span>, <text:span text:style-name="Code">WEATHER</text:span>, <text:span text:style-name="Code">ORBS</text:span> / <text:span text:style-name="Code">AP</text:span>, <text:span text:style-name="Code">SLOTS</text:span>, <text:span text:style-name="Code">PHASE</text:span> / <text:span text:style-name="Code">STEP</text:span>, <text:span text:style-name="Code">GAUGE</text:span> / <text:span text:style-name="Code">METER</text:span>, <text:span text:style-name="Code">CHARGE</text:span> / <text:span text:style-name="Code">BATTERY</text:span>.</text:p>
      <text:p text:style-name="P"/>
      <text:p text:style-name="P">Coloring:</text:p>
      <text:p text:style-name="P"/>
      <text:p text:style-name="Bullet">• Named suffix on the tag: <text:span text:style-name="Code">((PILLPINK))</text:span>, <text:span text:style-name="Code">((BARRED))</text:span></text:p>
      <text:p text:style-name="Bullet">• Or explicit: <text:span text:style-name="Code">((PILL - rebeccapurple))</text:span>, <text:span text:style-name="Code">((BAR - #ff6699))</text:span></text:p>
      <text:p text:style-name="Bullet">• Two colors → gradients (or BARREL positive/negative sides)</text:p>
      <text:p text:style-name="P"/>
      <text:p text:style-name="P"><text:span text:style-name="Code">((NPC)) Name:</text:span> starts a party-style card with freeform follow-up fields; matching Lorebook Agent portraits apply when names match.</text:p>
      <text:p text:style-name="P"/>
      <text:p text:style-name="P"/>
      <text:p text:style-name="P"/>
      <text:h text:style-name="H2" text:outline-level="2">The Lorebook Agent</text:h>
      <text:p text:style-name="P"/>
      <text:p text:style-name="P">If the State Tracker is the mechanical accountant, the Lorebook Agent (LA) is the librarian for macroscopic narrative memory. It is intended to pair with a summarizer (e.g. Summaryception) that keeps a rough arc; LA fills gaps with timestamped, keyworded entries drawn from recent narrative.</text:p>
      <text:p text:style-name="P"/>
      <text:h text:style-name="H3" text:outline-level="3">Attention model (“keyring”)</text:h>
      <text:p text:style-name="P"/>
      <text:p text:style-name="P">Native SillyTavern lorebooks are used as the database. Entries default inactive. LA’s attention model:</text:p>
      <text:p text:style-name="P"/>
      <text:p text:style-name="Bullet">• <text:span text:style-name="Strong">Active</text:span> entries: full content visible to the agent.</text:p>
      <text:p text:style-name="Bullet">• <text:span text:style-name="Strong">Inactive</text:span> entries: title + keywords only (the <text:span text:style-name="Strong">keyring</text:span> / archive summary) until activated.</text:p>
      <text:p text:style-name="Bullet">• <text:span text:style-name="Strong">Max Active</text:span> can FIFO-prune to control tokens.</text:p>
      <text:p text:style-name="P"/>
      <text:p text:style-name="P">LA is aware of keyword activations inside one container (extension scanner and/or native ST keyword activation, depending on settings).</text:p>
      <text:p text:style-name="P"/>
      <text:h text:style-name="H3" text:outline-level="3">How it runs</text:h>
      <text:p text:style-name="P"/>
      <text:p text:style-name="Bullet">• Default cadence: every <text:span text:style-name="Strong">N</text:span> counting generations (commonly 1–3; default often 3).</text:p>
      <text:p text:style-name="Bullet">• Lookback: since last run (recommended), since last user, or fixed count.</text:p>
      <text:p text:style-name="Bullet">• Modes:</text:p>
      <text:p text:style-name="P">  - <text:span text:style-name="Strong">Basic (tags):</text:span> structured <text:span text:style-name="Code">[[NPC: …]]</text:span> / LOC / FAC / QUEST / EVENT markers plus activate/deactivate/delete directives.</text:p>
      <text:p text:style-name="P">  - <text:span text:style-name="Strong">Advanced (tools):</text:span> ReAct tool loop (<text:span text:style-name="Code">grep_lore</text:span>, <text:span text:style-name="Code">inspect_book</text:span>, <text:span text:style-name="Code">read_entry</text:span>, <text:span text:style-name="Code">commit</text:span>, …) until finish / max turns.</text:p>
      <text:p text:style-name="Bullet">• World Skeleton books (<text:span text:style-name="Code">*_Skeleton</text:span>) are off-limits to the agent.</text:p>
      <text:p text:style-name="Bullet">• Campaign books use a prefix, e.g. <text:span text:style-name="Code">{prefix}_NPCs</text:span>, <text:span text:style-name="Code">_Locations</text:span>, <text:span text:style-name="Code">_Factions</text:span>, <text:span text:style-name="Code">_Quests</text:span>, <text:span text:style-name="Code">_Events</text:span>, <text:span text:style-name="Code">_World</text:span>, <text:span text:style-name="Code">_Skeleton</text:span>.</text:p>
      <text:p text:style-name="P"/>
      <text:h text:style-name="H3" text:outline-level="3">Relationships</text:h>
      <text:p text:style-name="P"/>
      <text:p text:style-name="P">Optional friendship/affection on NPC cards. Update methods (only one active):</text:p>
      <text:p text:style-name="P"/>
      <text:p text:style-name="Bullet">1. <text:span text:style-name="Strong">Narrator Regex</text:span> (default) — parses annotations like <text:span text:style-name="Code"><text:span text:style-name="Emph">(Friendship: Name +X — …)</text:span></text:span> / Affection from narrator output.</text:p>
      <text:p text:style-name="Bullet">2. <text:span text:style-name="Strong">State Tracker Tags</text:span> — tracker emits <text:span text:style-name="Code">[RELATIONS]</text:span> command lines; code applies deltas. (Those blocks are stripped before memo merge so they don’t leak into the GM memo.)</text:p>
      <text:p text:style-name="P"/>
      <text:p text:style-name="P">Caps default around ±150 (per-chat override possible in Campaign Records).</text:p>
      <text:p text:style-name="P"/>
      <text:h text:style-name="H3" text:outline-level="3">Portraits &amp; Visualization</text:h>
      <text:p text:style-name="P"/>
      <text:p text:style-name="Bullet">• Portraits via SillyTavern Image Generation <text:span text:style-name="Strong">or</text:span> Pollinations.ai.</text:p>
      <text:p text:style-name="Bullet">• Auto-gen toggles for linked PC, party, combat enemies, lorebook NPCs, locations.</text:p>
      <text:p text:style-name="Bullet">• <text:span text:style-name="Strong">Visualization Mode</text:span>: location hero image + present NPC/PC tiles (immersion / realtime scene view).</text:p>
      <text:p text:style-name="Bullet">• Real-time triggers: on location enter/change and/or every N outputs.</text:p>
      <text:p text:style-name="P"/>
      <text:h text:style-name="H3" text:outline-level="3">Slash command</text:h>
      <text:p text:style-name="P"/>
      <text:p text:style-name="P"><text:span text:style-name="Code">/lorebookagent</text:span> (aliases <text:span text:style-name="Code">/lbagent</text:span>, <text:span text:style-name="Code">/la</text:span>, <text:span text:style-name="Code">/router</text:span>):</text:p>
      <text:p text:style-name="P"/>
      <text:p text:style-name="Bullet">• Default / <text:span text:style-name="Code">run</text:span> — normal pass</text:p>
      <text:p text:style-name="Bullet">• <text:span text:style-name="Code">save [hint]</text:span> — save scene to lorebook</text:p>
      <text:p text:style-name="Bullet">• free text — Direct Command (with lookback)</text:p>
      <text:p text:style-name="Bullet">• <text:span text:style-name="Code">quiet=true</text:span>, <text:span text:style-name="Code">lookback=N</text:span></text:p>
      <text:p text:style-name="P"/>
      <text:p text:style-name="P">LA also has its own <text:span text:style-name="Strong">💬</text:span> Direct Prompt in the agent panel.</text:p>
      <text:p text:style-name="P"/>
      <text:p text:style-name="P"/>
      <text:p text:style-name="P"/>
      <text:h text:style-name="H2" text:outline-level="2">World Progression</text:h>
      <text:p text:style-name="P"/>
      <text:p text:style-name="P">World Progression (WP) is the fourth major simulation pillar: a macroscopic backbone so the GM thinks beyond the player’s bubble.</text:p>
      <text:p text:style-name="P"/>
      <text:p text:style-name="P">Every X <text:span text:style-name="Strong">in-world</text:span> hours (default 24), WP injects a World Report into context (stored in <text:span text:style-name="Code">{prefix}_World</text:span>, injection every turn while active). Example flavor:</text:p>
      <text:p text:style-name="P"/>
      <text:p text:style-name="Quote">World  </text:p>
      <text:p text:style-name="Quote">[01/06/3029, 08:00 AM] - First Prince Hanse Davion reviews urgent planetary status updates…</text:p>
      <text:p text:style-name="P"/>
      <text:h text:style-name="H3" text:outline-level="3">Deterministic trigger</text:h>
      <text:p text:style-name="P"/>
      <text:p text:style-name="P">JavaScript checks <text:span text:style-name="Code">[TIME]</text:span> in the State Memo after State Tracker updates. The AI writes the report; it does <text:span text:style-name="Strong">not</text:span> decide whether to generate one. WP requires Lorebook Agent enabled. First successful TIME parse stamps a baseline and does not fire; later elapsed intervals fire reports. Manual <text:span text:style-name="Strong">Generate Now</text:span> is always available.</text:p>
      <text:p text:style-name="P"/>
      <text:h text:style-name="H3" text:outline-level="3">Quick Start Guide</text:h>
      <text:p text:style-name="P"/>
      <text:p text:style-name="Bullet">1. <text:span text:style-name="Strong">Atmosphere Summary</text:span> — write manually or Auto-Generate from recent chat (tone/texture; avoid specific named plot dumps).</text:p>
      <text:p text:style-name="Bullet">2. <text:span text:style-name="Strong">Generate Skeleton</text:span> — factions, locations, NPCs, conflicts as Day 0 baseline in <text:span text:style-name="Code">{prefix}_Skeleton</text:span>. Edit afterward in native lorebook UI for full customization.</text:p>
      <text:p text:style-name="Bullet">3. <text:span text:style-name="Strong">Focus Randomization</text:span> (recommended) — lottery across skeleton vs organic pools so reports don’t fixate on the player bubble. Active <text:span text:style-name="Code">[PARTY]</text:span> is excluded; <text:span text:style-name="Code">[BENCHED PARTY]</text:span> members remain eligible.</text:p>
      <text:p text:style-name="Bullet">4. <text:span text:style-name="Strong">Generate the First Report</text:span> — Generate Now (skeleton-only if early) or wait for the interval (later runs include organic lore).</text:p>
      <text:p text:style-name="P"/>
      <text:h text:style-name="H3" text:outline-level="3">Tips</text:h>
      <text:p text:style-name="P"/>
      <text:p text:style-name="Bullet">• 24h in-world is a solid default; try shorter/longer intervals.</text:p>
      <text:p text:style-name="Bullet">• Injection position/depth changes how prominently reports sit near recent messages.</text:p>
      <text:p text:style-name="Bullet">• WP is optional but deepens simulation and lets dormant entities resurface.</text:p>
      <text:p text:style-name="P"/>
      <text:p text:style-name="P"/>
      <text:p text:style-name="P"/>
      <text:h text:style-name="H2" text:outline-level="2">Quests (player-facing)</text:h>
      <text:p text:style-name="P"/>
      <text:p text:style-name="P">Enable the Quests module (and optionally Deadlines / Frustration) in settings. Accepted quests appear in the tracker UI. Difficulty is narrative-only — the system does not soft-cap quest danger to party level; if you accept a dragon hunt at level 2, that is on you.</text:p>
      <text:p text:style-name="P"/>
      <text:p text:style-name="P"/>
      <text:p text:style-name="P"/>
      <text:h text:style-name="H2" text:outline-level="2">CYOA Mode</text:h>
      <text:p text:style-name="P"/>
      <text:p text:style-name="P">When enabled in narrator configuration, the GM ends turns with numbered courses of action (often with emojis). The extension turns those into clickable chat buttons. Style, slots, and presets live under CYOA settings. Cartridge export can include CYOA config.</text:p>
      <text:p text:style-name="P"/>
      <text:p text:style-name="P"><text:span text:style-name="Strong">Pre-Seeded Only</text:span> RNG is the recommended pairing with CYOA (Hybrid tools are less natural with button-driven turns).</text:p>
      <text:p text:style-name="P"/>
      <text:p text:style-name="P"/>
      <text:p text:style-name="P"/>
      <text:h text:style-name="H2" text:outline-level="2">Game Systems Wizard &amp; Cartridges</text:h>
      <text:p text:style-name="P"/>
      <text:h text:style-name="H3" text:outline-level="3">Game Systems Wizard</text:h>
      <text:p text:style-name="P"/>
      <text:p text:style-name="P">Describe a mechanic in plain language (e.g. “reputation system”). The wizard drafts a linked pair:</text:p>
      <text:p text:style-name="P"/>
      <text:p text:style-name="Bullet">1. A <text:span text:style-name="Strong">GM sysprompt section</text:span></text:p>
      <text:p text:style-name="Bullet">2. A <text:span text:style-name="Strong">State Tracker module</text:span></text:p>
      <text:p text:style-name="P"/>
      <text:p text:style-name="P">Review both in the forge (edit, regenerate either/both, iterate with feedback, set effect owner), then save as a Game System bundle. No tool-calling required for this flow — it is tag/prompt based.</text:p>
      <text:p text:style-name="P"/>
      <text:h text:style-name="H3" text:outline-level="3">Game Cartridges</text:h>
      <text:p text:style-name="P"/>
      <text:p text:style-name="P">Export/import a portable setup (<text:span text:style-name="Code">multihog-game-cartridge</text:span> format), typically including:</text:p>
      <text:p text:style-name="P"/>
      <text:p text:style-name="Bullet">• State Tracker prompts, modules, order, RNG/time-related flags</text:p>
      <text:p text:style-name="Bullet">• CYOA config</text:p>
      <text:p text:style-name="Bullet">• Game Systems + custom fields</text:p>
      <text:p text:style-name="Bullet">• Character sheet section/preset-related data</text:p>
      <text:p text:style-name="Bullet">• Portrait prompt templates/presets</text:p>
      <text:p text:style-name="Bullet">• Lorebook Agent prompts/modules/custom tags</text:p>
      <text:p text:style-name="Bullet">• World Progression report prompt</text:p>
      <text:p text:style-name="P"/>
      <text:p text:style-name="P"><text:span text:style-name="Strong">Not</text:span> included: API connections, most UI preferences, or live per-chat memo/campaign state. A virtual <text:span text:style-name="Strong">Stock</text:span> cartridge represents factory defaults.</text:p>
      <text:p text:style-name="P"/>
      <text:p text:style-name="P"/>
      <text:p text:style-name="P"/>
      <text:h text:style-name="H2" text:outline-level="2">Themes &amp; Appearance</text:h>
      <text:p text:style-name="P"/>
      <text:p text:style-name="P">Built-in visual themes: Match ST UI, Hacker, Fantasy, Hologram, Pacific Cove, Cherry Blossom, plus <text:span text:style-name="Strong">Custom</text:span> via AI Theme Wizard (describe → New / Iterate / Save to library). Optional scenario art behind the tracker panel; separate backdrop options for the detached Lorebook Agent window.</text:p>
      <text:p text:style-name="P"/>
      <text:p text:style-name="P"/>
      <text:p text:style-name="P"/>
      <text:h text:style-name="H2" text:outline-level="2">Narrative Components (high level)</text:h>
      <text:p text:style-name="P"/>
      <text:p text:style-name="P">Configurable narrator-side behaviors include:</text:p>
      <text:p text:style-name="P"/>
      <text:p text:style-name="Bullet">• <text:span text:style-name="Strong">Narrative Pacing</text:span> modes (e.g. Normal / High-Agency / Downtime)</text:p>
      <text:p text:style-name="Bullet">• <text:span text:style-name="Strong">Benched Party</text:span> handling (ties into WP eligibility)</text:p>
      <text:p text:style-name="Bullet">• <text:span text:style-name="Strong">Relationship Tracking</text:span> sections in the GM prompt</text:p>
      <text:p text:style-name="Bullet">• <text:span text:style-name="Strong">CYOA</text:span> choice presentation</text:p>
      <text:p text:style-name="Bullet">• End-of-output footer reminders so the GM closes turns in the format ST expects</text:p>
      <text:p text:style-name="P"/>
      <text:p text:style-name="P"/>
      <text:p text:style-name="P"/>
      <text:h text:style-name="H2" text:outline-level="2">Customization Without D&amp;D</text:h>
      <text:p text:style-name="P"/>
      <text:p text:style-name="P">You are not locked to wizards and goblins:</text:p>
      <text:p text:style-name="P"/>
      <text:p text:style-name="Bullet">1. Disable or delete stock modules you don’t need.</text:p>
      <text:p text:style-name="Bullet">2. Add custom fields / modules (manually or via wizards).</text:p>
      <text:p text:style-name="Bullet">3. Use Custom Sysprompt Mode or Control Room library entries for a wholly different ruleset.</text:p>
      <text:p text:style-name="Bullet">4. Export the result as a Game Cartridge for reuse.</text:p>
      <text:p text:style-name="P"/>
      <text:p text:style-name="P">The framework’s backbone is still <text:span text:style-name="Strong">time + memo + optional lore/world layers</text:span> — the fiction genre is yours.</text:p>
      <text:p text:style-name="P"/>
      <text:p text:style-name="P"/>
      <text:p text:style-name="P"/>
      <text:h text:style-name="H2" text:outline-level="2">Slash Commands (summary)</text:h>
      <text:p text:style-name="P"/>
      <text:p text:style-name="P">Command — Purpose</text:p>
      <text:p text:style-name="P"><text:span text:style-name="Code">/statetracker</text:span> (<text:span text:style-name="Code">/st</text:span>) — Manual State Tracker update / full audit</text:p>
      <text:p text:style-name="P"><text:span text:style-name="Code">/lorebookagent</text:span> (<text:span text:style-name="Code">/lbagent</text:span>, <text:span text:style-name="Code">/la</text:span>, <text:span text:style-name="Code">/router</text:span>) — Manual Lorebook Agent pass / save / direct command</text:p>
      <text:p text:style-name="P"><text:span text:style-name="Code">/roll</text:span> (<text:span text:style-name="Code">/r</text:span>) — Manual dice</text:p>
      <text:p text:style-name="P"/>
      <text:p text:style-name="P"/>
      <text:p text:style-name="P"/>
      <text:h text:style-name="H2" text:outline-level="2">Troubleshooting (quick)</text:h>
      <text:p text:style-name="P"/>
      <text:p text:style-name="P">Symptom — Likely cause / fix</text:p>
      <text:p text:style-name="P">GM ignores inventory/HP — Tracker off, memo empty, or Custom Sysprompt Mode left you without <text:span text:style-name="Code">&lt;state_memo&gt;</text:span> guidance — check ST enabled and memo injecting.</text:p>
      <text:p text:style-name="P">Dice always favor the player — Enable Pre-Seeded and/or Hybrid tool-call RNG; ensure model supports tools for Hybrid.</text:p>
      <text:p text:style-name="P">Combat tools still firing / queue missing — Hybrid switches at <text:span text:style-name="Code">[COMBAT]</text:span> boundary; confirm combat block present/ended correctly (<text:span text:style-name="Code">END_COMBAT</text:span>).</text:p>
      <text:p text:style-name="P">World Reports never appear — WP + Lorebook Agent must be on; <text:span text:style-name="Code">[TIME]</text:span> must advance in-world past the interval; first TIME parse only baselines.</text:p>
      <text:p text:style-name="P">Lorebook Agent “missed” a <text:span text:style-name="Code">/sendas</text:span> scene — Expected — run <text:span text:style-name="Code">/lorebookagent</text:span> manually.</text:p>
      <text:p text:style-name="P">Wrong campaign data in a new chat — Chat-Linked Mode should isolate chats; if links were removed or disabled, memo restore behavior differs — check Chat-Linked settings.</text:p>
      <text:p text:style-name="P">Tracker formatting broken after paste — Use 💬 Direct Prompt: “Reformat this sheet to stock module layout.”</text:p>
      <text:p text:style-name="P"/>
      <text:p text:style-name="P"/>
      <text:p text:style-name="P"/>
      <text:h text:style-name="H2" text:outline-level="2">Mental Model (one paragraph)</text:h>
      <text:p text:style-name="P"/>
      <text:p text:style-name="P">The <text:span text:style-name="Strong">System Prompt</text:span> teaches the narrator how to simulate. <text:span text:style-name="Strong">Hybrid RNG</text:span> supplies unbiased randomness. The <text:span text:style-name="Strong">State Tracker</text:span> audits each reply into a memo that is re-injected next turn. The <text:span text:style-name="Strong">Lorebook Agent</text:span> keeps long-horizon people/places/events available despite summarization. <text:span text:style-name="Strong">World Progression</text:span> advances the off-screen world on the in-world clock. Everything else — quests, CYOA, portraits, cartridges, themes — is optional depth on that spine.</text:p>
    </office:text>
  </office:body>
</office:document-content>
</file>

<file path=styles.xml><?xml version="1.0" encoding="utf-8"?>
<office:document-styles xmlns:office="urn:oasis:names:tc:opendocument:xmlns:office:1.0" xmlns:style="urn:oasis:names:tc:opendocument:xmlns:style:1.0" office:version="1.3">
  <office:styles/>
</office:document-styles>
</file>

<file path=meta.xml><?xml version="1.0" encoding="utf-8"?>
<office:document-meta xmlns:office="urn:oasis:names:tc:opendocument:xmlns:office:1.0" xmlns:dc="http://purl.org/dc/elements/1.1/" xmlns:meta="urn:oasis:names:tc:opendocument:xmlns:meta:1.0" office:version="1.3">
  <office:meta>
    <dc:title>Multihog D&amp;D Framework</dc:title>
    <meta:generator>Cursor doc builder</meta:generator>
  </office:meta>
</office:document-meta>
</file>